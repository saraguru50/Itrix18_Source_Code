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ebefe" officeooo:paragraph-rsid="001ebefe"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b3310" officeooo:paragraph-rsid="002b3310"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b3310" officeooo:paragraph-rsid="003a571d"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3a571d" officeooo:paragraph-rsid="003a571d"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tyle="normal" style:text-underline-style="none" fo:font-weight="normal" officeooo:rsid="001ebefe" officeooo:paragraph-rsid="001ebefe"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1ebefe" officeooo:paragraph-rsid="001ebefe"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officeooo:rsid="001ebefe" officeooo:paragraph-rsid="001ebefe" style:font-size-asian="20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253be7" officeooo:paragraph-rsid="00253be7" style:font-size-asian="15pt" style:font-style-asian="italic" style:font-weight-asian="bold" style:font-size-complex="15pt" style:font-style-complex="italic" style:font-weight-complex="bold"/>
    </style:style>
    <style:style style:name="P9" style:family="paragraph" style:parent-style-name="Standard">
      <style:text-properties officeooo:rsid="003565bd" officeooo:paragraph-rsid="003565bd"/>
    </style:style>
    <style:style style:name="P10" style:family="paragraph" style:parent-style-name="Text_20_body">
      <style:text-properties officeooo:paragraph-rsid="00289170"/>
    </style:style>
    <style:style style:name="P11" style:family="paragraph" style:parent-style-name="Text_20_body">
      <style:text-properties fo:font-size="13pt" style:font-size-asian="13pt" style:font-size-complex="13pt"/>
    </style:style>
    <style:style style:name="P12" style:family="paragraph" style:parent-style-name="Text_20_body">
      <style:text-properties fo:font-size="13pt" officeooo:rsid="00289170" officeooo:paragraph-rsid="00289170" style:font-size-asian="13pt" style:font-size-complex="13pt"/>
    </style:style>
    <style:style style:name="P13" style:family="paragraph" style:parent-style-name="Text_20_body">
      <style:text-properties fo:font-size="13pt" officeooo:rsid="0024fa70" officeooo:paragraph-rsid="0024fa70" style:font-size-asian="13pt" style:font-size-complex="13pt"/>
    </style:style>
    <style:style style:name="P14" style:family="paragraph" style:parent-style-name="Text_20_body">
      <style:text-properties fo:font-size="13pt" officeooo:rsid="00252544" officeooo:paragraph-rsid="00252544" style:font-size-asian="13pt" style:font-size-complex="13pt"/>
    </style:style>
    <style:style style:name="P15" style:family="paragraph" style:parent-style-name="Text_20_body">
      <style:text-properties fo:font-size="13pt" officeooo:paragraph-rsid="00253be7" style:font-size-asian="13pt" style:font-size-complex="13pt"/>
    </style:style>
    <style:style style:name="P16" style:family="paragraph" style:parent-style-name="Text_20_body">
      <style:text-properties fo:font-size="13pt" officeooo:rsid="00253be7" officeooo:paragraph-rsid="00253be7" style:font-size-asian="13pt" style:font-size-complex="13pt"/>
    </style:style>
    <style:style style:name="P17" style:family="paragraph" style:parent-style-name="Text_20_body">
      <style:text-properties fo:font-size="13pt" officeooo:paragraph-rsid="00252544" style:font-size-asian="13pt" style:font-size-complex="13pt"/>
    </style:style>
    <style:style style:name="P18" style:family="paragraph" style:parent-style-name="Text_20_body">
      <style:text-properties fo:font-size="13pt" officeooo:rsid="00416042" officeooo:paragraph-rsid="00416042" style:font-size-asian="13pt" style:font-size-complex="13pt"/>
    </style:style>
    <style:style style:name="P19" style:family="paragraph" style:parent-style-name="Text_20_body">
      <style:text-properties fo:font-size="13pt" officeooo:rsid="004394b6" officeooo:paragraph-rsid="004394b6" style:font-size-asian="13pt" style:font-size-complex="13pt"/>
    </style:style>
    <style:style style:name="P20" style:family="paragraph" style:parent-style-name="Text_20_body">
      <style:text-properties fo:font-size="13pt" style:text-underline-style="solid" style:text-underline-width="auto" style:text-underline-color="font-color" style:font-size-asian="13pt" style:font-size-complex="13pt"/>
    </style:style>
    <style:style style:name="P21" style:family="paragraph" style:parent-style-name="Text_20_body">
      <style:text-properties fo:font-size="13pt" style:text-underline-style="solid" style:text-underline-width="auto" style:text-underline-color="font-color" officeooo:rsid="0043afac" officeooo:paragraph-rsid="0043afac" style:font-size-asian="13pt" style:font-size-complex="13pt"/>
    </style:style>
    <style:style style:name="P22" style:family="paragraph" style:parent-style-name="Text_20_body">
      <style:text-properties fo:font-size="13pt" style:text-underline-style="none" officeooo:rsid="0043afac" officeooo:paragraph-rsid="0043afac" style:font-size-asian="13pt" style:font-size-complex="13pt"/>
    </style:style>
    <style:style style:name="P23" style:family="paragraph" style:parent-style-name="Text_20_body">
      <style:text-properties fo:font-size="13pt" style:text-underline-style="none" officeooo:rsid="00455bba" officeooo:paragraph-rsid="00455bba" style:font-size-asian="13pt" style:font-size-complex="13pt"/>
    </style:style>
    <style:style style:name="P24" style:family="paragraph" style:parent-style-name="Text_20_body">
      <style:text-properties fo:font-size="13pt" style:text-underline-style="none" officeooo:rsid="00455bba" officeooo:paragraph-rsid="0056898a" style:font-size-asian="13pt" style:font-size-complex="13pt"/>
    </style:style>
    <style:style style:name="P25" style:family="paragraph" style:parent-style-name="Text_20_body">
      <style:text-properties officeooo:rsid="003565bd" officeooo:paragraph-rsid="003565bd"/>
    </style:style>
    <style:style style:name="P26" style:family="paragraph" style:parent-style-name="Text_20_body">
      <style:text-properties officeooo:rsid="0038d09a" officeooo:paragraph-rsid="0038d09a"/>
    </style:style>
    <style:style style:name="P27" style:family="paragraph" style:parent-style-name="Text_20_body">
      <style:text-properties officeooo:paragraph-rsid="0038d09a"/>
    </style:style>
    <style:style style:name="P28" style:family="paragraph" style:parent-style-name="Text_20_body">
      <style:text-properties officeooo:rsid="0039bfcd" officeooo:paragraph-rsid="0039bfcd"/>
    </style:style>
    <style:style style:name="P29" style:family="paragraph" style:parent-style-name="Text_20_body">
      <style:text-properties officeooo:rsid="0048d102" officeooo:paragraph-rsid="0048d102"/>
    </style:style>
    <style:style style:name="P30" style:family="paragraph" style:parent-style-name="Text_20_body">
      <style:text-properties style:text-underline-style="solid" style:text-underline-width="auto" style:text-underline-color="font-color" officeooo:rsid="0048d102" officeooo:paragraph-rsid="0048d102"/>
    </style:style>
    <style:style style:name="P31" style:family="paragraph" style:parent-style-name="Text_20_body">
      <style:text-properties style:text-underline-style="solid" style:text-underline-width="auto" style:text-underline-color="font-color" officeooo:rsid="004a05ef" officeooo:paragraph-rsid="004a05ef"/>
    </style:style>
    <style:style style:name="P32" style:family="paragraph" style:parent-style-name="Text_20_body">
      <style:text-properties style:text-underline-style="solid" style:text-underline-width="auto" style:text-underline-color="font-color" officeooo:rsid="004b37d3" officeooo:paragraph-rsid="004b37d3"/>
    </style:style>
    <style:style style:name="P33" style:family="paragraph" style:parent-style-name="Text_20_body">
      <style:text-properties style:text-underline-style="solid" style:text-underline-width="auto" style:text-underline-color="font-color" officeooo:rsid="004d01bc" officeooo:paragraph-rsid="004d01bc"/>
    </style:style>
    <style:style style:name="P34" style:family="paragraph" style:parent-style-name="Text_20_body">
      <style:text-properties officeooo:rsid="004a05ef" officeooo:paragraph-rsid="004a05ef"/>
    </style:style>
    <style:style style:name="P35" style:family="paragraph" style:parent-style-name="Text_20_body">
      <style:text-properties style:text-underline-style="none" officeooo:rsid="004a05ef" officeooo:paragraph-rsid="004a05ef"/>
    </style:style>
    <style:style style:name="P36" style:family="paragraph" style:parent-style-name="Text_20_body">
      <style:text-properties style:text-underline-style="none" officeooo:rsid="004d01bc" officeooo:paragraph-rsid="004d01bc"/>
    </style:style>
    <style:style style:name="P37" style:family="paragraph" style:parent-style-name="Standard">
      <style:paragraph-properties fo:margin-top="0cm" fo:margin-bottom="0.499cm" loext:contextual-spacing="false"/>
      <style:text-properties officeooo:rsid="00360251" officeooo:paragraph-rsid="00360251"/>
    </style:style>
    <style:style style:name="P38" style:family="paragraph" style:parent-style-name="Standard">
      <style:paragraph-properties fo:margin-top="0cm" fo:margin-bottom="0.499cm" loext:contextual-spacing="false"/>
      <style:text-properties officeooo:rsid="00360251" officeooo:paragraph-rsid="00375158"/>
    </style:style>
    <style:style style:name="P39" style:family="paragraph" style:parent-style-name="Preformatted_20_Text">
      <style:paragraph-properties fo:margin-top="0cm" fo:margin-bottom="0.499cm" loext:contextual-spacing="false"/>
    </style:style>
    <style:style style:name="P40" style:family="paragraph" style:parent-style-name="Preformatted_20_Text">
      <style:paragraph-properties fo:margin-top="0cm" fo:margin-bottom="0.499cm" loext:contextual-spacing="false"/>
      <style:text-properties officeooo:paragraph-rsid="003565bd"/>
    </style:style>
    <style:style style:name="P41" style:family="paragraph" style:parent-style-name="Preformatted_20_Text">
      <style:paragraph-properties fo:margin-top="0cm" fo:margin-bottom="0.499cm" loext:contextual-spacing="false"/>
      <style:text-properties officeooo:rsid="00360251" officeooo:paragraph-rsid="00360251"/>
    </style:style>
    <style:style style:name="P42" style:family="paragraph" style:parent-style-name="Preformatted_20_Text">
      <style:text-properties officeooo:paragraph-rsid="003565bd"/>
    </style:style>
    <style:style style:name="P43" style:family="paragraph" style:parent-style-name="Preformatted_20_Text">
      <style:text-properties officeooo:rsid="003565bd" officeooo:paragraph-rsid="003565bd"/>
    </style:style>
    <style:style style:name="P44" style:family="paragraph" style:parent-style-name="Preformatted_20_Text" style:list-style-name="L1">
      <style:paragraph-properties fo:margin-top="0cm" fo:margin-bottom="0.499cm" loext:contextual-spacing="false"/>
    </style:style>
    <style:style style:name="P45" style:family="paragraph" style:parent-style-name="Preformatted_20_Text" style:list-style-name="L1">
      <style:paragraph-properties fo:margin-top="0cm" fo:margin-bottom="0.499cm" loext:contextual-spacing="false"/>
      <style:text-properties officeooo:paragraph-rsid="003565bd"/>
    </style:style>
    <style:style style:name="T1" style:family="text">
      <style:text-properties officeooo:rsid="0021a6c5"/>
    </style:style>
    <style:style style:name="T2" style:family="text">
      <style:text-properties officeooo:rsid="00221fb2"/>
    </style:style>
    <style:style style:name="T3" style:family="text">
      <style:text-properties officeooo:rsid="0023b93c"/>
    </style:style>
    <style:style style:name="T4" style:family="text">
      <style:text-properties officeooo:rsid="00252544"/>
    </style:style>
    <style:style style:name="T5" style:family="text">
      <style:text-properties officeooo:rsid="0029604f"/>
    </style:style>
    <style:style style:name="T6" style:family="text">
      <style:text-properties officeooo:rsid="002b3310"/>
    </style:style>
    <style:style style:name="T7" style:family="text">
      <style:text-properties style:text-underline-style="none"/>
    </style:style>
    <style:style style:name="T8" style:family="text">
      <style:text-properties style:text-underline-style="none" officeooo:rsid="004fa80b"/>
    </style:style>
    <style:style style:name="T9" style:family="text">
      <style:text-properties style:text-underline-style="none" officeooo:rsid="005083b8"/>
    </style:style>
    <style:style style:name="T10" style:family="text">
      <style:text-properties officeooo:rsid="002cf57b"/>
    </style:style>
    <style:style style:name="T11" style:family="text">
      <style:text-properties officeooo:rsid="002e48fd"/>
    </style:style>
    <style:style style:name="T12" style:family="text">
      <style:text-properties officeooo:rsid="002f505d"/>
    </style:style>
    <style:style style:name="T13" style:family="text">
      <style:text-properties fo:font-size="13pt" style:font-size-asian="13pt" style:font-size-complex="13pt"/>
    </style:style>
    <style:style style:name="T14" style:family="text">
      <style:text-properties fo:font-size="13pt" officeooo:rsid="00289170" style:font-size-asian="13pt" style:font-size-complex="13pt"/>
    </style:style>
    <style:style style:name="T15" style:family="text">
      <style:text-properties fo:font-size="13pt" officeooo:rsid="002cf57b" style:font-size-asian="13pt" style:font-size-complex="13pt"/>
    </style:style>
    <style:style style:name="T16" style:family="text">
      <style:text-properties officeooo:rsid="0031aeea"/>
    </style:style>
    <style:style style:name="T17" style:family="text">
      <style:text-properties fo:font-style="italic"/>
    </style:style>
    <style:style style:name="T18" style:family="text">
      <style:text-properties officeooo:rsid="00360251"/>
    </style:style>
    <style:style style:name="T19" style:family="text">
      <style:text-properties officeooo:rsid="00367ddf"/>
    </style:style>
    <style:style style:name="T20" style:family="text">
      <style:text-properties officeooo:rsid="00375158"/>
    </style:style>
    <style:style style:name="T21" style:family="text">
      <style:text-properties officeooo:rsid="0038d09a"/>
    </style:style>
    <style:style style:name="T22" style:family="text">
      <style:text-properties fo:font-size="15pt" fo:font-weight="bold" style:font-size-asian="15pt" style:font-weight-asian="bold" style:font-size-complex="15pt" style:font-weight-complex="bold"/>
    </style:style>
    <style:style style:name="T23" style:family="text">
      <style:text-properties officeooo:rsid="0039e30b"/>
    </style:style>
    <style:style style:name="T24" style:family="text">
      <style:text-properties officeooo:rsid="0041d2a1"/>
    </style:style>
    <style:style style:name="T25" style:family="text">
      <style:text-properties officeooo:rsid="004394b6"/>
    </style:style>
    <style:style style:name="T26" style:family="text">
      <style:text-properties officeooo:rsid="0043afac"/>
    </style:style>
    <style:style style:name="T27" style:family="text">
      <style:text-properties officeooo:rsid="00455bba"/>
    </style:style>
    <style:style style:name="T28" style:family="text">
      <style:text-properties officeooo:rsid="0047ca3e"/>
    </style:style>
    <style:style style:name="T29" style:family="text">
      <style:text-properties officeooo:rsid="004a05ef"/>
    </style:style>
    <style:style style:name="T30" style:family="text">
      <style:text-properties officeooo:rsid="004b37d3"/>
    </style:style>
    <style:style style:name="T31" style:family="text">
      <style:text-properties officeooo:rsid="004d01bc"/>
    </style:style>
    <style:style style:name="T32" style:family="text">
      <style:text-properties officeooo:rsid="0056bc06"/>
    </style:style>
    <style:style style:name="T33" style:family="text">
      <style:text-properties officeooo:rsid="005819c5"/>
    </style:style>
    <style:style style:name="T34" style:family="text">
      <style:text-properties officeooo:rsid="0059e357"/>
    </style:style>
    <style:style style:name="T35" style:family="text">
      <style:text-properties officeooo:rsid="005fc539"/>
    </style:style>
    <style:style style:name="T36" style:family="text">
      <style:text-properties officeooo:rsid="00657eef"/>
    </style:style>
    <style:style style:name="T37" style:family="text">
      <style:text-properties officeooo:rsid="0068d13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ource Code Prelims</text:p>
      <text:p text:style-name="P7"/>
      <text:p text:style-name="P3">(Note:</text:p>
      <text:p text:style-name="P4"><text:span text:style-name="T7"><text:tab/>For algorithmic problems, both accuracy and complexity of the code </text:span><text:span text:style-name="T8">wiil be taken into <text:tab/>account for </text:span><text:span text:style-name="T9">scoring.</text:span><text:span text:style-name="T8"> </text:span></text:p>
      <text:p text:style-name="P3">)</text:p>
      <text:p text:style-name="P2"/>
      <text:p text:style-name="P1"/>
      <text:p text:style-name="P8">WEB CHALLENGES:</text:p>
      <text:p text:style-name="P6"/>
      <text:p text:style-name="P11">1) What is the syntax used to perform multi-line commenting in a html document? <text:s/><text:span text:style-name="T3">(Mark 1)</text:span></text:p>
      <text:p text:style-name="P11"/>
      <text:p text:style-name="P20">Options:</text:p>
      <text:p text:style-name="P11"/>
      <text:p text:style-name="P11">a) <text:span text:style-name="T2">&lt;!</text:span>/* <text:s text:c="11"/>*/<text:span text:style-name="T2">&gt;</text:span></text:p>
      <text:p text:style-name="P11">b) &lt;!// <text:s text:c="11"/>//&gt;</text:p>
      <text:p text:style-name="P11">c) &lt;!-- <text:s text:c="10"/>--&gt;</text:p>
      <text:p text:style-name="P11">d) &lt;!”” <text:s text:c="10"/>“”&gt;</text:p>
      <text:p text:style-name="P11"/>
      <text:p text:style-name="P11"/>
      <text:p text:style-name="P12">2) What will be ouput of the following javascript code? <text:s/>(Mark 2)</text:p>
      <text:p text:style-name="P12"/>
      <text:p text:style-name="P12">&lt;script&gt;</text:p>
      <text:p text:style-name="P12"><text:tab/><text:span text:style-name="T5">var s1 = ‘0’;</text:span></text:p>
      <text:p text:style-name="P12"><text:tab/><text:span text:style-name="T5">var s2 = false;</text:span></text:p>
      <text:p text:style-name="P12"><text:tab/><text:span text:style-name="T5">if(s1 == s2) {</text:span></text:p>
      <text:p text:style-name="P12"><text:tab/><text:tab/><text:span text:style-name="T5">alert(“hi”);</text:span></text:p>
      <text:p text:style-name="P12"><text:tab/><text:span text:style-name="T5">}<text:line-break/><text:tab/>if(s1 === s2) {</text:span></text:p>
      <text:p text:style-name="P12"><text:tab/><text:tab/><text:span text:style-name="T5">alert(“hello”);</text:span></text:p>
      <text:p text:style-name="P12"><text:tab/><text:span text:style-name="T5">}</text:span></text:p>
      <text:p text:style-name="P12">&lt;/script&gt;</text:p>
      <text:p text:style-name="P11"/>
      <text:p text:style-name="P11"><text:soft-page-break/><text:span text:style-name="T10">3</text:span>) Whatwill the following javascript code output to the console? <text:s text:c="2"/>(Mark 3)</text:p>
      <text:p text:style-name="P11"/>
      <text:p text:style-name="P12">&lt;script&gt;</text:p>
      <text:p text:style-name="Text_20_body"><text:span text:style-name="Source_20_Text"><text:span text:style-name="T13">var arr1 = "john".split('');</text:span></text:span></text:p>
      <text:p text:style-name="Text_20_body"><text:span text:style-name="Source_20_Text"><text:span text:style-name="T13">var arr2 = arr1.reverse();</text:span></text:span></text:p>
      <text:p text:style-name="Text_20_body"><text:span text:style-name="Source_20_Text"><text:span text:style-name="T13">var arr3 = "jones".split('');</text:span></text:span></text:p>
      <text:p text:style-name="Text_20_body"><text:span text:style-name="Source_20_Text"><text:span text:style-name="T13">arr2.push(arr3);</text:span></text:span></text:p>
      <text:p text:style-name="Text_20_body"><text:span text:style-name="Source_20_Text"><text:span text:style-name="T13">console.log("array 1: length=" + arr1.length + " last=" + arr1.slice(-1));</text:span></text:span></text:p>
      <text:p text:style-name="Text_20_body"><text:span text:style-name="Source_20_Text"><text:span text:style-name="T13">console.log("array 2: length=" + arr2.length + " last=" + arr2.slice(-1));</text:span></text:span></text:p>
      <text:p text:style-name="P10"><text:span text:style-name="Source_20_Text"><text:span text:style-name="T14">&lt;/script&gt;</text:span></text:span></text:p>
      <text:p text:style-name="Text_20_body"><text:span text:style-name="Source_20_Text"><text:span text:style-name="T13"/></text:span></text:p>
      <text:p text:style-name="Text_20_body"><text:span text:style-name="Source_20_Text"><text:span text:style-name="T15">4</text:span></text:span><text:span text:style-name="Source_20_Text"><text:span text:style-name="T13">) What will the following javascript code output to the console? (Mark 3)</text:span></text:span></text:p>
      <text:p text:style-name="P10"><text:span text:style-name="Source_20_Text"><text:span text:style-name="T14">&lt;script&gt;</text:span></text:span></text:p>
      <text:p text:style-name="Text_20_body"><text:span text:style-name="Source_20_Text"><text:span text:style-name="T13">var a={},</text:span></text:span></text:p>
      <text:p text:style-name="Text_20_body"><text:span text:style-name="Source_20_Text"><text:span text:style-name="T13"><text:s text:c="3"/>b={key:'b'},</text:span></text:span></text:p>
      <text:p text:style-name="Text_20_body"><text:span text:style-name="Source_20_Text"><text:span text:style-name="T13"><text:s text:c="3"/>c={key:'c'};</text:span></text:span></text:p>
      <text:p text:style-name="Text_20_body"><text:span text:style-name="Source_20_Text"><text:span text:style-name="T13"/></text:span></text:p>
      <text:p text:style-name="Text_20_body"><text:span text:style-name="Source_20_Text"><text:span text:style-name="T13">a[b]=123;</text:span></text:span></text:p>
      <text:p text:style-name="Text_20_body"><text:span text:style-name="Source_20_Text"><text:span text:style-name="T13">a[c]=456;</text:span></text:span></text:p>
      <text:p text:style-name="Text_20_body"><text:span text:style-name="Source_20_Text"><text:span text:style-name="T13"/></text:span></text:p>
      <text:p text:style-name="Text_20_body"><text:span text:style-name="Source_20_Text"><text:span text:style-name="T13">console.log(a[b]);</text:span></text:span></text:p>
      <text:p text:style-name="P10"><text:span text:style-name="Source_20_Text"><text:span text:style-name="T14">&lt;/script&gt;</text:span></text:span></text:p>
      <text:p text:style-name="P17"><text:s/></text:p>
      <text:p text:style-name="P13"><text:span text:style-name="T10">5</text:span>) <text:span text:style-name="T4">How about doing ssome reverse engineering to the php code??? <text:s/>(Mark 5)</text:span></text:p>
      <text:p text:style-name="P14">You are given a Php code and you have to give the correct input to the code to generate the output.</text:p>
      <text:p text:style-name="P14">&lt;?php</text:p>
      <text:p text:style-name="P14"><text:soft-page-break/><text:tab/>$str = bin2hex($x);</text:p>
      <text:p text:style-name="P14"><text:tab/>$str1 = strrev($str);</text:p>
      <text:p text:style-name="P15"><text:span text:style-name="T4"><text:tab/>if($str1 == “</text:span>5444f434058405<text:span text:style-name="T4">”) {</text:span></text:p>
      <text:p text:style-name="P14"><text:tab/><text:tab/>echo “Well done!!”;</text:p>
      <text:p text:style-name="P14"><text:tab/>}</text:p>
      <text:p text:style-name="P14"><text:tab/>else {</text:p>
      <text:p text:style-name="P14"><text:tab/><text:tab/>echo “Try again”;</text:p>
      <text:p text:style-name="P14"><text:tab/>}</text:p>
      <text:p text:style-name="P14"/>
      <text:p text:style-name="P14">?&gt;</text:p>
      <text:p text:style-name="P16">What is the value of ‘x’ in the above code <text:span text:style-name="T16">to have the if statement get executed</text:span>??</text:p>
      <text:p text:style-name="P16">(Reference: <text:s text:c="3"/></text:p>
      <text:p text:style-name="P16"><text:tab/>bin2hex() function displays the characters of the string in its ascii value in hex format</text:p>
      <text:p text:style-name="P16"><text:s/>)</text:p>
      <text:p text:style-name="P16"/>
      <text:p text:style-name="P18">6) <text:s/><text:span text:style-name="T25">You are given the following html code.. <text:s/>(Mark 5)</text:span></text:p>
      <text:p text:style-name="P19">&lt;html&gt;</text:p>
      <text:p text:style-name="P19"><text:tab/>&lt;script&gt;</text:p>
      <text:p text:style-name="P19"><text:tab/><text:tab/>function func() {</text:p>
      <text:p text:style-name="P19"><text:tab/><text:tab/><text:tab/>// Complete the following code</text:p>
      <text:p text:style-name="P19"><text:tab/><text:tab/>}</text:p>
      <text:p text:style-name="P19"><text:tab/>&lt;/script&gt;</text:p>
      <text:p text:style-name="P19"><text:tab/>&lt;body bgcolor=”skyblue”&gt;</text:p>
      <text:p text:style-name="P19"><text:tab/><text:tab/>Enter a text: &lt;input type=”text” value=”hello” id=”t1”&gt; &lt;br&gt;&lt;br&gt;</text:p>
      <text:p text:style-name="P19"><text:tab/><text:tab/>&lt;button onclick=func();&gt; <text:s/>Submit &lt;/button&gt; &lt;br&gt;&lt;br&gt;</text:p>
      <text:p text:style-name="P19"><text:tab/><text:tab/>&lt;p id=”p”&gt;&lt;/p&gt;</text:p>
      <text:p text:style-name="P19"><text:tab/>&lt;/body&gt;</text:p>
      <text:p text:style-name="P19"/>
      <text:p text:style-name="P19">&lt;/html&gt;</text:p>
      <text:p text:style-name="P19"><text:soft-page-break/>When the user clicks the submit button, the value of the text box “hello” has to appended to the paragraph tag... Write the javascript function func() <text:s text:c="2"/>to do the above task...</text:p>
      <text:p text:style-name="P19"/>
      <text:p text:style-name="P19">7) <text:s/><text:span text:style-name="T26">You are given an empty php file named ‘sample.php’ and a html file <text:s/>‘request.html’. (Mark 8)</text:span></text:p>
      <text:p text:style-name="P19"/>
      <text:p text:style-name="P21">Sample.php</text:p>
      <text:p text:style-name="P22">&lt;?php</text:p>
      <text:p text:style-name="P22"><text:tab/>// <text:span text:style-name="T27">Complete the following code</text:span></text:p>
      <text:p text:style-name="P22">?&gt;</text:p>
      <text:p text:style-name="P22"/>
      <text:p text:style-name="P21">Request.html</text:p>
      <text:p text:style-name="P22">&lt;html&gt;</text:p>
      <text:p text:style-name="P22"><text:tab/><text:span text:style-name="T27">&lt;script&gt;</text:span></text:p>
      <text:p text:style-name="P22"><text:tab/><text:tab/><text:span text:style-name="T27">function func() {</text:span></text:p>
      <text:p text:style-name="P22"><text:tab/><text:tab/><text:tab/>//<text:span text:style-name="T27">Complete the following code</text:span></text:p>
      <text:p text:style-name="P22"><text:tab/><text:tab/><text:span text:style-name="T27">}</text:span></text:p>
      <text:p text:style-name="P22"><text:tab/><text:span text:style-name="T27">&lt;/script&gt;</text:span></text:p>
      <text:p text:style-name="P22"><text:tab/>&lt;body bgcolor=”skyblue”&gt;</text:p>
      <text:p text:style-name="P22"><text:tab/><text:tab/><text:span text:style-name="T27">&lt;p id=”p”&gt; welcome to the html file&lt;/p&gt;</text:span></text:p>
      <text:p text:style-name="P22"><text:tab/><text:tab/><text:span text:style-name="T27">&lt;button onclick=func();&gt; Submit &lt;/button&gt;</text:span></text:p>
      <text:p text:style-name="P22"><text:tab/>&lt;/body&gt;</text:p>
      <text:p text:style-name="P22">&lt;/html&gt;</text:p>
      <text:p text:style-name="P22"/>
      <text:p text:style-name="P24">In the above example, when the user clicks the submit button, the text in the paragraph tag has to taken to the javascript function. </text:p>
      <text:p text:style-name="P24">Write an ajax request <text:span text:style-name="T33">in the javascript function func() </text:span>to the ‘sample.php’ file <text:span text:style-name="T32">and send the text along with the request</text:span>. Convert the text to upper case in the php file and send the response back to javascript <text:span text:style-name="T33">function func()</text:span>. <text:span text:style-name="T34">Finally replace the response with the text in the paragraph tag.</text:span></text:p>
      <text:p text:style-name="P23"/>
      <text:p text:style-name="P5"><text:soft-page-break/></text:p>
      <text:p text:style-name="P8">ALGORITHMIC CHALLENGES:</text:p>
      <text:p text:style-name="P6"/>
      <text:p text:style-name="P11">1) <text:span text:style-name="T10">Analyse the function performed by the following snippet:) (Mark 3)</text:span></text:p>
      <text:p text:style-name="P11">int function(int n) {</text:p>
      <text:p text:style-name="P11"><text:tab/><text:span text:style-name="T10">int count = 0;</text:span></text:p>
      <text:p text:style-name="P11"><text:tab/> while (n) {</text:p>
      <text:p text:style-name="P11"><text:s text:c="4"/><text:tab/><text:tab/>count += n &amp; 1;</text:p>
      <text:p text:style-name="P11"><text:s text:c="4"/><text:tab/><text:tab/>n &gt;&gt;= 1;</text:p>
      <text:p text:style-name="P11"><text:s text:c="2"/><text:tab/>}</text:p>
      <text:p text:style-name="P11"><text:tab/><text:span text:style-name="T10">return count;</text:span></text:p>
      <text:p text:style-name="P11">}</text:p>
      <text:p text:style-name="P11">What is the value returned by the above function??</text:p>
      <text:p text:style-name="P11"/>
      <text:p text:style-name="P11"><text:span text:style-name="T6">2)</text:span> <text:s/>Caesar cipher is a well known encryption algorithm which works by shifting the given message by a specified number of characters. (Eg: <text:s text:c="3"/>message = “abcde”, shift = 3, encrypted text = “defgh”)</text:p>
      <text:p text:style-name="P11">(Explanation: <text:s text:c="4"/>‘a’ + 3 = ‘d’, <text:s text:c="3"/>‘b’ + 3 = ‘e’, <text:s text:c="2"/>‘c’ <text:s/>+ 3 = ‘f’ , <text:s text:c="3"/>‘d’ + 3 = ‘g’, <text:s text:c="4"/>‘e’ + 3 = ‘h’ <text:s/>)</text:p>
      <text:p text:style-name="P11"/>
      <text:p text:style-name="P11">In this problem, you are given a message and an encrypted text and your task is to find the possible shifts that it can have. <text:s text:c="4"/><text:span text:style-name="T3">(Mark 2)</text:span></text:p>
      <text:p text:style-name="P11"/>
      <text:p text:style-name="P11">Plain text <text:s text:c="8"/>= <text:s/>“caesar cipher algorithm”</text:p>
      <text:p text:style-name="P11">Encrypted text = <text:s/>“rpthpg rxewtg pavdgxiwb”</text:p>
      <text:p text:style-name="P11"/>
      <text:p text:style-name="P11">i) 2<text:span text:style-name="T1">5</text:span> <text:s text:c="5"/>ii) <text:span text:style-name="T24">378</text:span> <text:s text:c="5"/>iii) <text:s/>15 <text:s text:c="5"/>iv) <text:s/>405</text:p>
      <text:p text:style-name="P20">Options:</text:p>
      <text:p text:style-name="P11">a) Only i)</text:p>
      <text:p text:style-name="P11">b) Both ii<text:span text:style-name="T35">i</text:span>) and i<text:span text:style-name="T35">i</text:span>)</text:p>
      <text:p text:style-name="P11">c) Both iii) and iv)</text:p>
      <text:p text:style-name="P11">d) None of the above</text:p>
      <text:p text:style-name="P11"><text:soft-page-break/><text:s/></text:p>
      <text:p text:style-name="P11"><text:span text:style-name="T10">3</text:span>) Write a program to detect a cycle in an undirected graph <text:span text:style-name="T28">as well as directed graph</text:span>. <text:s text:c="3"/>(Mark 5)</text:p>
      <text:p text:style-name="P11">(Function part is sufficient but do cover all the corner cases to get the full score:):)</text:p>
      <text:p text:style-name="P11"/>
      <text:p text:style-name="P11"/>
      <text:p text:style-name="P11"><text:span text:style-name="T10">4</text:span>) <text:span text:style-name="T11">You are given an n * m matrix where ‘n’ and ‘m’ denote the number of rows and columns in the matrix. Each cell in the matrix has a positive integer and you are currently in the cell (1,1) and you have to go the cell (n,m). From your current cell, you can only go to the right and down cells. What a program to find the maximum amount of points that you can get by traversing through the matrix??? <text:s text:c="2"/>(Mark 8)</text:span></text:p>
      <text:p text:style-name="P11"/>
      <text:p text:style-name="P11">(Note: </text:p>
      <text:p text:style-name="P11"><text:tab/>* You can visit a cell only once<text:tab/></text:p>
      <text:p text:style-name="P11"><text:tab/>* <text:s/><text:span text:style-name="T12">When you visit a cell, the integer in the cell is added to your total points</text:span></text:p>
      <text:p text:style-name="P11"><text:tab/>* <text:s/><text:span text:style-name="T12">You have to reach the cell (n,m) from (1,1) </text:span></text:p>
      <text:p text:style-name="P11"><text:span text:style-name="T12"><text:s/>)</text:span> </text:p>
      <text:p text:style-name="P11"/>
      <text:p text:style-name="Text_20_body"><text:span text:style-name="T13">5) <text:s/></text:span><text:s/>You are given a permutation of the numbers 1, 2, ..., <text:span text:style-name="T17">n</text:span> and <text:span text:style-name="T17">m</text:span> pairs of positions (<text:span text:style-name="T17">aj</text:span>, <text:span text:style-name="T17">bj</text:span>).</text:p>
      <text:p text:style-name="Text_20_body">At each step you can choose a pair from the given positions and swap the numbers in that positions. What is the lexicographically maximal permutation one can get?Let <text:span text:style-name="T17">p</text:span> and <text:span text:style-name="T17">q</text:span> be two permutations of the numbers 1, 2, ..., <text:span text:style-name="T17">n</text:span>. <text:span text:style-name="T17">p</text:span> is lexicographically smaller than the <text:span text:style-name="T17">q</text:span> if a number 1 ≤ <text:span text:style-name="T17">i</text:span> ≤ <text:span text:style-name="T17">n</text:span> exists, so <text:span text:style-name="T17">pk</text:span> = <text:span text:style-name="T17">qk</text:span> for 1 ≤ <text:span text:style-name="T17">k</text:span> &lt; <text:span text:style-name="T17">i</text:span> and <text:span text:style-name="T17">pi</text:span> &lt; <text:span text:style-name="T17">qi</text:span>.</text:p>
      <text:p text:style-name="P25">Write a program to find the lexicographically maximal permutation that you can get?? <text:s text:c="2"/>(Mark 10)</text:p>
      <text:p text:style-name="P30">Sample:</text:p>
      <text:p text:style-name="P9">Input</text:p>
      <text:p text:style-name="Preformatted_20_Text">9 6</text:p>
      <text:p text:style-name="Preformatted_20_Text">1 2 3 4 5 6 7 8 9</text:p>
      <text:p text:style-name="Preformatted_20_Text">1 4</text:p>
      <text:p text:style-name="Preformatted_20_Text">4 7</text:p>
      <text:p text:style-name="Preformatted_20_Text">2 5</text:p>
      <text:p text:style-name="Preformatted_20_Text">5 8</text:p>
      <text:p text:style-name="Preformatted_20_Text">3 6</text:p>
      <text:p text:style-name="P39">6 9</text:p>
      <text:p text:style-name="Text_20_body">Output</text:p>
      <text:p text:style-name="P39">7 8 9 4 5 6 1 2 3</text:p>
      <text:p text:style-name="P25"><text:soft-page-break/></text:p>
      <text:p text:style-name="P25"/>
      <text:p text:style-name="P25">6) What will be the output for the following code snippet?? <text:span text:style-name="T18">(Mark 3)</text:span></text:p>
      <text:p text:style-name="P43"><text:s text:c="4"/>#include &lt;bits/stdc++.h&gt;</text:p>
      <text:p text:style-name="P42"/>
      <text:p text:style-name="P42"><text:s text:c="4"/><text:span text:style-name="T19">using namespace std;</text:span></text:p>
      <text:p text:style-name="P42"/>
      <text:p text:style-name="P42"><text:s text:c="4"/><text:span text:style-name="T19">int</text:span> main() {</text:p>
      <text:p text:style-name="P40"><text:tab/>int k = 8;</text:p>
      <text:list xml:id="list3206148897837527578" text:style-name="L1">
        <text:list-header>
          <text:p text:style-name="P44">int x = 0 == 1 &amp;&amp; k++;</text:p>
          <text:p text:style-name="P45">printf("%d%d\n", x, k);</text:p>
          <text:p text:style-name="P45">}</text:p>
        </text:list-header>
      </text:list>
      <text:p text:style-name="P40"/>
      <text:p text:style-name="P41">7) What will be output of the following code snippet?? (Mark 3)</text:p>
      <text:p text:style-name="P37"><text:span text:style-name="Source_20_Text">#include&lt;</text:span><text:span text:style-name="Source_20_Text"><text:span text:style-name="T20">bits/stdc++.h</text:span></text:span><text:span text:style-name="Source_20_Text">&gt;</text:span></text:p>
      <text:p text:style-name="P38"><text:span text:style-name="Source_20_Text"><text:span text:style-name="T20">using namespace std;</text:span></text:span></text:p>
      <text:p text:style-name="Standard"><text:span text:style-name="Source_20_Text">int</text:span> <text:span text:style-name="Source_20_Text">main()</text:span></text:p>
      <text:p text:style-name="Standard"><text:span text:style-name="Source_20_Text">{</text:span></text:p>
      <text:p text:style-name="Standard"><text:span text:style-name="Source_20_Text"><text:tab/>int</text:span> <text:span text:style-name="Source_20_Text">i = 20,j;</text:span></text:p>
      <text:p text:style-name="Standard"><text:span text:style-name="Source_20_Text"><text:tab/>i = (printf("Hello"), printf(" All Geeks "));</text:span></text:p>
      <text:p text:style-name="Standard"><text:span text:style-name="Source_20_Text"><text:tab/>printf("%d", i);</text:span></text:p>
      <text:p text:style-name="Standard"><text:tab/><text:span text:style-name="Source_20_Text">return</text:span> <text:span text:style-name="Source_20_Text">0;</text:span></text:p>
      <text:p text:style-name="Standard"><text:span text:style-name="Source_20_Text">}</text:span></text:p>
      <text:p text:style-name="P41"/>
      <text:p text:style-name="P39"><text:s text:c="3"/></text:p>
      <text:p text:style-name="P26">8) Write a program to remove every kth node in a linked..(Mark 5)</text:p>
      <text:p text:style-name="P26">(Do cover all the test cases to get the maximum score :):)</text:p>
      <text:p text:style-name="P26"/>
      <text:p text:style-name="P27"><text:span text:style-name="T21">Eg:) <text:s text:c="8"/></text:span>Input : 1-&gt;2-&gt;3-&gt;4-&gt;5-&gt;6-&gt;7-&gt;8 <text:s/></text:p>
      <text:p text:style-name="Preformatted_20_Text"><text:s text:c="8"/><text:span text:style-name="T21">K</text:span> = 3</text:p>
      <text:p text:style-name="Preformatted_20_Text"><text:s/></text:p>
      <text:p text:style-name="P39"><text:s text:c="8"/>Output : 1-&gt;2-&gt;4-&gt;5-&gt;7-&gt;8</text:p>
      <text:p text:style-name="P26"/>
      <text:p text:style-name="P28">9) Write a program to find the diameter of the binary tree..(Mark 5)</text:p>
      <text:p text:style-name="P28">The structure of the binary tree is,</text:p>
      <text:p text:style-name="P28">struct node {</text:p>
      <text:p text:style-name="P28"><text:soft-page-break/><text:tab/>int data;</text:p>
      <text:p text:style-name="P28"><text:tab/>struct node *left, *right;</text:p>
      <text:p text:style-name="P28">}</text:p>
      <text:p text:style-name="P28"/>
      <text:p text:style-name="P28">10) You are given a 2D matrix where each cell in the matrix contains an integer (not necessarily positive) <text:s text:c="2"/><text:span text:style-name="T23">(Mark 10)</text:span></text:p>
      <text:p text:style-name="P28">Your task is to write a program that will find the maximum rectangle sum in the matrix.</text:p>
      <text:p text:style-name="P28">Eg: <text:s text:c="11"/>[1,2,-1,-4,-20</text:p>
      <text:p text:style-name="P28"><text:s text:c="18"/>-8,<text:span text:style-name="T22">-3,4,2,</text:span>1</text:p>
      <text:p text:style-name="P28"><text:s text:c="19"/>3,<text:span text:style-name="T22">8,10,1</text:span>,3</text:p>
      <text:p text:style-name="P28"><text:s text:c="19"/>-4,<text:span text:style-name="T22">-1,1,7</text:span>,-6]</text:p>
      <text:p text:style-name="P28"/>
      <text:p text:style-name="P28">The bolded rectangle in the above example has the maximum sum of all the submatri<text:span text:style-name="T36">ces</text:span>.</text:p>
      <text:p text:style-name="P28"/>
      <text:p text:style-name="P28">-<text:span text:style-name="T23">3 + 4 + 2 + 8 + 10 + 1 -1 + 1 + 7 = 29</text:span></text:p>
      <text:p text:style-name="P28"/>
      <text:p text:style-name="P29">11) <text:span text:style-name="T29">Now for the last one, we have an interesting game theory question:):)</text:span></text:p>
      <text:p text:style-name="P34">You are given string consisting of lowercase letters. Two players A and B wants to play a game with the string. During a player’s turn, he can choose any alphabet which is <text:span text:style-name="T31">currently </text:span>present in the string and remove any number of that particular character from the string. The player who cannot make the move will lose the game. Player A will start the game always. Write a program to predict who will be the winner of the game if both of them play optimally. <text:s text:c="4"/>(Mark 6)</text:p>
      <text:p text:style-name="P31">Sample:</text:p>
      <text:p text:style-name="P31">Input:</text:p>
      <text:p text:style-name="P35">c<text:span text:style-name="T30">a</text:span>bccabbccb<text:span text:style-name="T30">a</text:span></text:p>
      <text:p text:style-name="P31">Output:</text:p>
      <text:p text:style-name="P35">Player A wins the game</text:p>
      <text:p text:style-name="P35"/>
      <text:p text:style-name="P32">Input:</text:p>
      <text:p text:style-name="P36">bbcaccbcbc</text:p>
      <text:p text:style-name="P33">Output:</text:p>
      <text:p text:style-name="P36">Player B wins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09:12:06.719652269</meta:creation-date>
    <dc:date>2018-01-30T16:16:02.311320288</dc:date>
    <meta:editing-duration>PT10H34M55S</meta:editing-duration>
    <meta:editing-cycles>52</meta:editing-cycles>
    <meta:generator>LibreOffice/5.1.6.2$Linux_X86_64 LibreOffice_project/10m0$Build-2</meta:generator>
    <meta:document-statistic meta:table-count="0" meta:image-count="0" meta:object-count="0" meta:page-count="8" meta:paragraph-count="185" meta:word-count="1244" meta:character-count="6908" meta:non-whitespace-character-count="5508"/>
  </office:meta>
</office:document-meta>
</file>